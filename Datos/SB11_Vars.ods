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191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11.5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style:text-align-source="fix" style:repeat-content="fals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a500"/>
      <style:text-properties style:font-name="Liberation Serif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ackground-color="#000080"/>
      <style:text-properties style:font-name="Liberation Serif" fo:font-size="12pt" style:font-size-asian="12pt" style:font-size-complex="12pt"/>
    </style:style>
    <style:style style:name="ce5" style:family="table-cell" style:parent-style-name="Default"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fo:background-color="#000080"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5"/>
        <table:table-column table:style-name="co4" table:number-columns-repeated="16381" table:default-cell-style-name="ce5"/>
        <table:table-row table:style-name="ro1">
          <table:table-cell table:style-name="ce1" office:value-type="string" calcext:value-type="string">
            <text:p>Dimensión</text:p>
          </table:table-cell>
          <table:table-cell table:style-name="ce1" office:value-type="string" calcext:value-type="string">
            <text:p>Naturaleza</text:p>
          </table:table-cell>
          <table:table-cell table:style-name="ce1" office:value-type="string" calcext:value-type="string">
            <text:p>Descripció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bicación geográfica</text:p>
          </table:table-cell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3" office:value-type="string" calcext:value-type="string">
            <text:p>estu_depto_resid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Departamento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3" office:value-type="string" calcext:value-type="string">
            <text:p>estu_cod_reside_dept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Código del departamento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3" office:value-type="string" calcext:value-type="string">
            <text:p>estu_mcpio_resid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Municipio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3" office:value-type="string" calcext:value-type="string">
            <text:p>estu_cod_reside_mcpi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Código del municipio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2" office:value-type="string" calcext:value-type="string">
            <text:p>Caracterización del estudiante</text:p>
          </table:table-cell>
          <table:table-cell table:style-name="ce2"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3" office:value-type="string" calcext:value-type="string">
            <text:p>estu_gener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Genero del estudiante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3" office:value-type="string" calcext:value-type="string">
            <text:p>estu_fechanacimiento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Fecha de nacimiento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3" office:value-type="string" calcext:value-type="string">
            <text:p>estu_estudiant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Tipo de individuo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3" office:value-type="string" calcext:value-type="string">
            <text:p>estu_dedicacionlecturadiari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Tiempo de lectura diaria</text:p>
          </table:table-cell>
          <table:table-cell table:number-columns-repeated="6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3" office:value-type="string" calcext:value-type="string">
            <text:p>estu_dedicacioninternet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Tiempo de internet diario</text:p>
          </table:table-cell>
          <table:table-cell table:number-columns-repeated="6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3" office:value-type="string" calcext:value-type="string">
            <text:p>estu_horassemanatrabaj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Horas trabajadas en la semana</text:p>
          </table:table-cell>
          <table:table-cell table:number-columns-repeated="6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3" office:value-type="string" calcext:value-type="string">
            <text:p>punt_global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Puntaje global</text:p>
          </table:table-cell>
          <table:table-cell table:number-columns-repeated="6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3" office:value-type="string" calcext:value-type="string">
            <text:p>estu_inse_individual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Puntaje INS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aracterización familiar</text:p>
          </table:table-cell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3" office:value-type="string" calcext:value-type="string">
            <text:p>fami_estratovivien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Estrato socio-económico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fami_personas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úmero de personas en el hogar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fami_cuartoshoga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úmero de cuartos en el hogar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fami_educacionpadr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ivel educativo del padre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>
            <text:p>fami_educacionmadr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ivel educativo de la madre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>
            <text:p>fami_tieneinternet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internet?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>
            <text:p>fami_tieneserviciotv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servicio de TV?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>
            <text:p>fami_tienecomputador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computador?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>
            <text:p>fami_tienelavador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lavadora?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>
            <text:p>fami_tienehornomicroogas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horno microondas?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>
            <text:p>fami_tieneautomovil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automovil?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fami_tienemotocicleta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¿El hogar cuenta con motocicleta?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utrición</text:p>
          </table:table-cell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3" office:value-type="string" calcext:value-type="string">
            <text:p>fami_comelechederivados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de consumo de leche y derivados en el hogar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fami_comecarnepescadohuev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de consumo de carne, pescado o huevo en el hogar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fami_comecerealfrutoslegumbre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de consumo de cereal, frutos o legumbres en el hoga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aracterización escolar</text:p>
          </table:table-cell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3" office:value-type="string" calcext:value-type="string">
            <text:p>cole_genero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Genero del colegio (masculino, femenino, mixto)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cole_naturalez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Naturaleza del colegio (Oficial, no oficial)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cole_caracter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Tipo de enfoque del colegio (académico, técnico, etc.)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cole_area_ubicacion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Zona de ubicación de la institución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cole_jornada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Jornada a la que asiste el estudiante</text:p>
          </table:table-cell>
          <table:table-cell table:number-columns-repeated="16381"/>
        </table:table-row>
        <table:table-row table:style-name="ro1">
          <table:table-cell table:style-name="ce4"/>
          <table:table-cell table:style-name="ce7"/>
          <table:table-cell table:style-name="ce4"/>
          <table:table-cell table:number-columns-repeated="16381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6T16:30:32.151092596</meta:creation-date>
    <dc:date>2026-07-06T17:03:17.342678146</dc:date>
    <meta:editing-duration>PT6M47S</meta:editing-duration>
    <meta:editing-cycles>3</meta:editing-cycles>
    <meta:generator>LibreOffice/25.2.3.2$Linux_X86_64 LibreOffice_project/520$Build-2</meta:generator>
    <meta:document-statistic meta:table-count="1" meta:cell-count="104" meta:object-count="0"/>
  </office:meta>
</office:document-meta>
</file>